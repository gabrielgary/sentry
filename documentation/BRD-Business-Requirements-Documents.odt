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84b" officeooo:paragraph-rsid="0007b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D</text:p>
      <text:p text:style-name="P1">BUSINESS REQUIREMENT DOCUMENT</text:p>
      <text:p text:style-name="P1">CENTRY SOFTWARE-SCHOOL MANAGEMENT SMART</text:p>
      <text:p text:style-name="P1"/>
      <text:p text:style-name="P1"/>
      <text:p text:style-name="P1">CONTEXTO DO NEGOCIO</text:p>
      <text:p text:style-name="P1">Que empresas </text:p>
      <text:p text:style-name="P1">Que sector</text:p>
      <text:p text:style-name="P1">Qual o modelo de negócio</text:p>
      <text:p text:style-name="P1">PROBLEMA ACTUAL</text:p>
      <text:p text:style-name="P1">O que está a correr mal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30T00:26:08.541768155</meta:creation-date>
    <dc:date>2026-06-30T00:29:58.524917571</dc:date>
    <meta:editing-duration>PT3M51S</meta:editing-duration>
    <meta:editing-cycles>1</meta:editing-cycles>
    <meta:document-statistic meta:table-count="0" meta:image-count="0" meta:object-count="0" meta:page-count="1" meta:paragraph-count="9" meta:word-count="28" meta:character-count="176" meta:non-whitespace-character-count="156"/>
    <meta:generator>LibreOffice/24.2.5.2$Linux_X86_64 LibreOffice_project/420$Build-2</meta:generator>
  </office:meta>
</office:document-meta>
</file>